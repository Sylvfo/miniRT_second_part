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isplay" svg:font-family="'Noto Sans Display'" style:font-family-generic="swiss" style:font-pitch="variable"/>
    <style:font-face style:name="Noto Sans Meetei Mayek" svg:font-family="'Noto Sans Meetei Mayek'" style:font-family-generic="swiss" style:font-pitch="variable"/>
    <style:font-face style:name="Noto Serif CJK SC" svg:font-family="'Noto Serif CJK SC'" style:font-family-generic="system" style:font-pitch="variable"/>
    <style:font-face style:name="rale" svg:font-family="rale"/>
    <style:font-face style:name="ralew" svg:font-family="ralew"/>
    <style:font-face style:name="raleway" svg:font-family="raleway"/>
  </office:font-face-decls>
  <office:automatic-styles>
    <style:style style:name="P1" style:family="paragraph" style:parent-style-name="Standard">
      <style:paragraph-properties fo:line-height="150%"/>
      <style:text-properties style:font-name="DejaVu Sans" officeooo:rsid="001c36f0" officeooo:paragraph-rsid="001c36f0"/>
    </style:style>
    <style:style style:name="P2" style:family="paragraph" style:parent-style-name="Standard">
      <style:paragraph-properties fo:line-height="150%"/>
      <style:text-properties fo:color="#158466" loext:opacity="100%" style:font-name="DejaVu Sans" officeooo:rsid="001c36f0" officeooo:paragraph-rsid="001c36f0"/>
    </style:style>
    <style:style style:name="P3" style:family="paragraph" style:parent-style-name="Standard">
      <style:paragraph-properties fo:line-height="150%"/>
      <style:text-properties style:font-name="DejaVu Sans" officeooo:rsid="0019959f" officeooo:paragraph-rsid="0019959f"/>
    </style:style>
    <style:style style:name="P4" style:family="paragraph" style:parent-style-name="Standard">
      <style:paragraph-properties fo:line-height="150%"/>
      <style:text-properties style:font-name="DejaVu Sans" officeooo:rsid="0019959f" officeooo:paragraph-rsid="001aeb87"/>
    </style:style>
    <style:style style:name="P5" style:family="paragraph" style:parent-style-name="Standard">
      <style:paragraph-properties fo:line-height="150%"/>
      <style:text-properties style:font-name="DejaVu Sans" officeooo:rsid="0019959f" officeooo:paragraph-rsid="001ab6e8"/>
    </style:style>
    <style:style style:name="P6" style:family="paragraph" style:parent-style-name="Standard">
      <style:paragraph-properties fo:line-height="150%"/>
      <style:text-properties officeooo:rsid="0019959f" officeooo:paragraph-rsid="0019959f"/>
    </style:style>
    <style:style style:name="P7" style:family="paragraph" style:parent-style-name="Standard">
      <style:paragraph-properties fo:line-height="150%"/>
      <style:text-properties officeooo:rsid="001dfc08" officeooo:paragraph-rsid="001dfc08"/>
    </style:style>
    <style:style style:name="P8" style:family="paragraph" style:parent-style-name="Standard">
      <style:paragraph-properties fo:line-height="150%"/>
      <style:text-properties officeooo:rsid="0019959f" officeooo:paragraph-rsid="001ab6e8"/>
    </style:style>
    <style:style style:name="P9" style:family="paragraph" style:parent-style-name="Standard">
      <style:paragraph-properties fo:line-height="150%"/>
      <style:text-properties officeooo:rsid="001a8673" officeooo:paragraph-rsid="001ab6e8"/>
    </style:style>
    <style:style style:name="T1" style:family="text">
      <style:text-properties fo:color="#2a6099" loext:opacity="100%"/>
    </style:style>
    <style:style style:name="T2" style:family="text">
      <style:text-properties officeooo:rsid="001aeb87"/>
    </style:style>
    <style:style style:name="T3" style:family="text">
      <style:text-properties officeooo:rsid="001d798e"/>
    </style:style>
    <style:style style:name="T4" style:family="text"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NDER MODE</text:span></text:p>
      <text:p text:style-name="P2">DRAWING MODE</text:p>
      <text:p text:style-name="P3"/>
      <text:p text:style-name="P3">Translate</text:p>
      <text:p text:style-name="P3">Copy</text:p>
      <text:p text:style-name="P3">Rotate</text:p>
      <text:p text:style-name="P3">Scale</text:p>
      <text:p text:style-name="P3">Change color</text:p>
      <text:p text:style-name="P3"/>
      <text:p text:style-name="P3"/>
      <text:p text:style-name="P4"><text:span text:style-name="T2">+</text:span> Sphere</text:p>
      <text:p text:style-name="P5"><text:span text:style-name="T2">+ </text:span>Plan</text:p>
      <text:p text:style-name="P5"><text:span text:style-name="T2">+ </text:span>Cyl</text:p>
      <text:p text:style-name="P5"><text:span text:style-name="T2">+ </text:span>…</text:p>
      <text:p text:style-name="P5"><text:span text:style-name="T2">+ </text:span>…</text:p>
      <text:p text:style-name="P5"><text:span text:style-name="T2">+ </text:span>…</text:p>
      <text:p text:style-name="P5"/>
      <text:p text:style-name="P3">Export <text:span text:style-name="T3">image.</text:span>jpg</text:p>
      <text:p text:style-name="P3">Export file.rt</text:p>
      <text:p text:style-name="P6"><text:span text:style-name="T4">Reload file.rt</text:span></text:p>
      <text:p text:style-name="P7"><text:span text:style-name="T4">_______________________</text:span></text:p>
      <text:p text:style-name="P8"/>
      <text:p text:style-name="P8"/>
      <text:p text:style-name="P6"/>
      <text:p text:style-name="P6"/>
      <text:p text:style-name="P9">Select object</text:p>
      <text:p text:style-name="P9">select axe x y z u</text:p>
      <text:p text:style-name="P9">Enter angle</text:p>
      <text:p text:style-name="P9">Enter distance</text:p>
      <text:p text:style-name="P9">Enter scal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isplay" svg:font-family="'Noto Sans Display'" style:font-family-generic="swiss" style:font-pitch="variable"/>
    <style:font-face style:name="Noto Sans Meetei Mayek" svg:font-family="'Noto Sans Meetei Mayek'" style:font-family-generic="swiss" style:font-pitch="variable"/>
    <style:font-face style:name="Noto Serif CJK SC" svg:font-family="'Noto Serif CJK SC'" style:font-family-generic="system" style:font-pitch="variable"/>
    <style:font-face style:name="rale" svg:font-family="rale"/>
    <style:font-face style:name="ralew" svg:font-family="ralew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4:09:41.736733994</meta:creation-date>
    <dc:date>2025-06-10T14:38:02.419588629</dc:date>
    <meta:editing-duration>PT17M30S</meta:editing-duration>
    <meta:editing-cycles>9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22" meta:word-count="43" meta:character-count="222" meta:non-whitespace-character-count="201"/>
  </office:meta>
</office:document-meta>
</file>